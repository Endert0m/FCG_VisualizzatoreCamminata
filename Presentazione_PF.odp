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2-title">
      <style:graphic-properties fo:min-height="0.101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075cm" svg:x="1cm" svg:y="7.336cm" presentation:class="title" presentation:user-transformed="true">
          <draw:text-box>
            <text:p>Studio efficienza camminata tramite tool grafico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it" fo:country="IT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lef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lef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lef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lef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lef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lef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lef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lef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lef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right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right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8T10:49:08.277263476</meta:creation-date>
    <dc:description>This work is licensed under a Creative Commons 0 License.
It makes use of the works of Jun NOGATA.</dc:description>
    <meta:generator>LibreOffice/26.2.4.2$Linux_X86_64 LibreOffice_project/620$Build-2</meta:generator>
    <dc:title>Midnightblue</dc:title>
    <meta:editing-duration>PT1H11M20S</meta:editing-duration>
    <meta:editing-cycles>2</meta:editing-cycles>
    <dc:date>2026-07-08T12:11:35.238358974</dc:date>
    <meta:document-statistic meta:object-count="61"/>
  </office:meta>
</office:document-meta>
</file>